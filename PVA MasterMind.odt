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Geenafstand" style:master-page-name="MPF0" style:family="paragraph">
      <style:paragraph-properties fo:break-before="page" fo:text-align="center" fo:margin-top="1.0694in" fo:margin-bottom="0.1666in"/>
    </style:style>
    <style:style style:name="T2" style:parent-style-name="Standaardalinea-lettertype" style:family="text">
      <style:text-properties fo:color="#4472C4" fo:language="nl" fo:country="NL" style:language-asian="nl" style:country-asian="NL"/>
    </style:style>
    <style:style style:name="P3" style:parent-style-name="Geenafstand"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Standaardalinea-lettertype" style:family="text">
      <style:text-properties style:font-name="Calibri Light" fo:text-transform="uppercase" fo:color="#4472C4" fo:font-size="36pt" style:font-size-asian="36pt" style:font-size-complex="36pt"/>
    </style:style>
    <style:style style:name="P5" style:parent-style-name="Geenafstand" style:family="paragraph">
      <style:paragraph-properties fo:text-align="center"/>
    </style:style>
    <style:style style:name="T6" style:parent-style-name="Standaardalinea-lettertype" style:family="text">
      <style:text-properties fo:color="#4472C4" fo:font-size="14pt" style:font-size-asian="14pt" style:font-size-complex="14pt"/>
    </style:style>
    <style:style style:name="P7" style:parent-style-name="Geenafstand" style:family="paragraph">
      <style:paragraph-properties fo:text-align="center" fo:margin-top="0.3333in"/>
    </style:style>
    <style:style style:name="T8" style:parent-style-name="Standaardalinea-lettertype" style:family="text">
      <style:text-properties fo:color="#4472C4" fo:language="nl" fo:country="NL" style:language-asian="nl" style:country-asian="NL"/>
    </style:style>
    <style:style style:name="P9" style:parent-style-name="Geenafstand" style:family="paragraph">
      <style:paragraph-properties fo:text-align="center" fo:margin-bottom="0.0277in"/>
    </style:style>
    <style:style style:name="T10" style:parent-style-name="Standaardalinea-lettertype" style:family="text">
      <style:text-properties fo:text-transform="uppercase" fo:color="#4472C4" fo:font-size="14pt" style:font-size-asian="14pt" style:font-size-complex="14pt"/>
    </style:style>
    <style:style style:name="P11" style:parent-style-name="Geenafstand" style:family="paragraph">
      <style:paragraph-properties fo:text-align="center"/>
    </style:style>
    <style:style style:name="T12" style:parent-style-name="Standaardalinea-lettertype" style:family="text">
      <style:text-properties fo:text-transform="uppercase" fo:color="#4472C4"/>
    </style:style>
    <style:style style:name="P13" style:parent-style-name="Geenafstand" style:family="paragraph">
      <style:paragraph-properties fo:text-align="center"/>
    </style:style>
    <style:style style:name="T14" style:parent-style-name="Standaardalinea-lettertype" style:family="text">
      <style:text-properties fo:color="#4472C4"/>
    </style:style>
    <style:style style:name="T15" style:parent-style-name="Standaardalinea-lettertype" style:family="text">
      <style:text-properties fo:color="#4472C4" fo:language="nl" fo:country="NL" style:language-asian="nl" style:country-asian="NL"/>
    </style:style>
    <style:style style:name="P16" style:parent-style-name="Standaard" style:family="paragraph">
      <style:paragraph-properties fo:break-before="page"/>
    </style:style>
    <style:style style:name="P17" style:parent-style-name="Inhopg1" style:family="paragraph">
      <style:paragraph-properties>
        <style:tab-stops>
          <style:tab-stop style:type="right" style:leader-style="dotted" style:leader-text="." style:position="6.2611in"/>
        </style:tab-stops>
      </style:paragraph-properties>
    </style:style>
    <style:style style:name="P18" style:parent-style-name="Standaard" style:family="paragraph">
      <style:paragraph-properties fo:break-before="page"/>
      <style:text-properties fo:language="en" fo:country="GB"/>
    </style:style>
    <style:style style:name="T19" style:parent-style-name="Heading1Char" style:family="text">
      <style:text-properties style:font-name-asian="Calibri"/>
    </style:style>
    <style:style style:name="T20" style:parent-style-name="Heading1Char" style:family="text">
      <style:text-properties style:font-name-asian="Calibri"/>
    </style:style>
    <style:style style:name="T21" style:parent-style-name="Standaardalinea-lettertype" style:family="text">
      <style:text-properties style:font-name="Arial" style:font-name-asian="Times New Roman" style:font-name-complex="Arial" fo:color="#333333" fo:font-size="9pt" style:font-size-asian="9pt" style:font-size-complex="9pt"/>
    </style:style>
    <style:style style:name="T22" style:parent-style-name="Standaardalinea-lettertype" style:family="text">
      <style:text-properties style:font-name="Arial" style:font-name-asian="Times New Roman" style:font-name-complex="Arial" fo:color="#333333" fo:font-size="9pt" style:font-size-asian="9pt" style:font-size-complex="9pt"/>
    </style:style>
    <style:style style:name="T23" style:parent-style-name="Standaardalinea-lettertype" style:family="text">
      <style:text-properties style:font-name="Arial" style:font-name-asian="Times New Roman" style:font-name-complex="Arial" fo:color="#333333" fo:font-size="9pt" style:font-size-asian="9pt" style:font-size-complex="9pt"/>
    </style:style>
    <style:style style:name="T24" style:parent-style-name="Heading1Char" style:family="text">
      <style:text-properties style:font-name-asian="Calibri"/>
    </style:style>
    <style:style style:name="T25" style:parent-style-name="Heading1Char" style:family="text">
      <style:text-properties style:font-name-asian="Calibri"/>
    </style:style>
    <style:style style:name="T26" style:parent-style-name="Heading1Char" style:family="text">
      <style:text-properties style:font-name-asian="Calibri"/>
    </style:style>
    <style:style style:name="T27" style:parent-style-name="Zwaar" style:family="text">
      <style:text-properties style:font-name="Calibri" style:font-name-complex="Calibri" fo:color="#333333" style:font-size-complex="9pt" fo:background-color="#FFFFFF"/>
    </style:style>
    <style:style style:name="T28" style:parent-style-name="Standaardalinea-lettertype" style:family="text">
      <style:text-properties style:font-name="Calibri" style:font-name-complex="Calibri" fo:color="#333333" style:font-size-complex="9pt"/>
    </style:style>
    <style:style style:name="T29" style:parent-style-name="Standaardalinea-lettertype" style:family="text">
      <style:text-properties style:font-name="Calibri" style:font-name-complex="Calibri" fo:color="#333333" style:font-size-complex="9pt"/>
    </style:style>
    <style:style style:name="T30" style:parent-style-name="Standaardalinea-lettertype" style:family="text">
      <style:text-properties style:font-name="Calibri" style:font-name-complex="Calibri" fo:color="#333333" style:font-size-complex="9pt" fo:background-color="#FFFFFF"/>
    </style:style>
    <style:style style:name="P31" style:parent-style-name="Standaard" style:family="paragraph">
      <style:text-properties style:font-name="Calibri" style:font-name-complex="Calibri" fo:color="#333333" style:font-size-complex="9pt" fo:background-color="#FFFFFF"/>
    </style:style>
    <style:style style:name="T32" style:parent-style-name="Standaardalinea-lettertype" style:family="text">
      <style:text-properties style:font-name="Calibri" style:font-name-complex="Calibri" fo:color="#333333" style:font-size-complex="9pt"/>
    </style:style>
    <style:style style:name="T33" style:parent-style-name="Standaardalinea-lettertype" style:family="text">
      <style:text-properties style:font-name="Calibri" style:font-name-complex="Calibri" fo:color="#333333" style:font-size-complex="9pt" fo:background-color="#FFFFFF"/>
    </style:style>
    <style:style style:name="T34" style:parent-style-name="Standaardalinea-lettertype" style:family="text">
      <style:text-properties style:font-name="Calibri" style:font-name-complex="Calibri" fo:color="#333333" style:font-size-complex="9pt" fo:background-color="#FFFFFF"/>
    </style:style>
    <style:style style:name="T35" style:parent-style-name="Standaardalinea-lettertype" style:family="text">
      <style:text-properties fo:font-weight="bold" style:font-weight-asian="bold" style:font-weight-complex="bold"/>
    </style:style>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fo:font-weight="bold" style:font-weight-asian="bold" style:font-weight-complex="bold"/>
    </style:style>
    <style:style style:name="T38" style:parent-style-name="Standaardalinea-lettertype"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3"><text:span text:style-name="T4">Master Mind</text:span></text:p>
      <text:p text:style-name="P5"><text:span text:style-name="T6">Project 4</text:span></text:p>
      <text:p text:style-name="P7"><text:span text:style-name="T8"><draw:frame draw:z-index="251659264" draw:id="id0" draw:style-name="a1" draw:name="Text Box 142" text:anchor-type="paragraph" svg:x="1in" svg:y="9.93889in" svg:width="6.26806in" svg:height="0.64514in" style:rel-width="scale" style:rel-height="scale"><draw:text-box><text:p text:style-name="P9"><text:span text:style-name="T10">May 18, 2018</text:span></text:p><text:p text:style-name="P11"><text:span text:style-name="T12">Danique en Robin</text:span></text:p><text:p text:style-name="P13"><text:span text:style-name="T14">Aventus</text:span></text:p></draw:text-box><svg:title/><svg:desc/></draw:frame></text:span><text:span text:style-name="T15"><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6"/>
      <text:p text:style-name="Kopvaninhoudsopgave">Contents</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7"><text:a xlink:href="#_Toc514404285" office:target-frame-name="_top" xlink:show="replace"><text:span text:style-name="Hyperlink">Inleiding</text:span><text:tab/>2</text:a></text:p>
        </text:index-body>
      </text:table-of-content>
      <text:p text:style-name="Standaard"/>
      <text:p text:style-name="P18"/>
      <text:p text:style-name="Standaard"><text:bookmark-start text:name="_Toc514404285"/><text:span text:style-name="T19">Inleiding</text:span><text:bookmark-end text:name="_Toc514404285"/><text:span text:style-name="T20"><text:line-break/></text:span><text:span text:style-name="T21">dit document beschrijft onze<text:s/></text:span><text:span text:style-name="T22"><text:line-break/></text:span><text:span text:style-name="T23"><text:line-break/></text:span><text:span text:style-name="T24">Wat is de aanleiding</text:span></text:p>
      <text:p text:style-name="Standaard">Als gezamelijke CEO’s van hun game studio, zoeken Danique en Robin altijd naar frisse nieuwe game concepten. Op een middag tijdens een converentie kwam er een idee naarvoren over een kluis kraak spelletje, gebaseerd op Master Mind.<text:s/></text:p>
      <text:p text:style-name="Standaard">Danique was lichtelijk verbaast. “Master Mind? Wat is dat?” vroeg ze aan Robin “dat is een soort spelletje met kleurtjes en combinaties” de uitleg maakte het niet veel makkelijker “weet je wat, waarom maken we dat niet eerst? Dan snap je ook waarom het leuk<text:s/>kan zijn” stelde Robin voor.<text:s/></text:p>
      <text:p text:style-name="Standaard">En dus besloten de twee om een Master Mind game te maken, zo snel en simpel mogelijk.<text:s/><text:line-break/><text:span text:style-name="T25"><text:line-break/></text:span><text:span text:style-name="T26">Projectopdracht</text:span><text:line-break/><text:line-break/>Voor de opdracht gaan we een software applicatie maken van het spel Master Mind. De opdracht wordt als duo uitgevoerd met het idee om mensen te kunnen laten ervaren wat dit voor een game is.</text:p>
      <text:p text:style-name="Standaard">De opdracht wordt uit onze eigen initiatief uitgevoerd.<text:s/><text:line-break/><text:line-break/><text:span text:style-name="T27">Op te leveren producten</text:span><text:span text:style-name="T28"><text:line-break/></text:span><text:span text:style-name="T29"><text:line-break/></text:span><text:span text:style-name="T30">Welke producten gaan jullie opleveren? </text:span></text:p>
      <text:p text:style-name="P31">Het product wat we gaan opleveren is het Spel mastermind gemaakt in Java.</text:p>
      <text:p text:style-name="Standaard"><text:span text:style-name="T32"><text:line-break/></text:span><text:span text:style-name="T33">Wat zullen de resultaten zijn van het project? </text:span></text:p>
      <text:p text:style-name="Standaard"><text:span text:style-name="T34">Het resultaat zal dus een digitale versie zijn van het spel mastermind, waarbij de speler tegen de computer speelt. De computer verzint zelf de 4 kleuren code en de speler moet zo snel mogelijk proberen de code te kraken.<text:s/></text:span></text:p>
      <text:p text:style-name="Standaard"><text:line-break/><text:line-break/><text:span text:style-name="T35">Aanpak</text:span><text:line-break/><text:line-break/>Onze aanpak is met zijn tweeën op dezelfde taak richten, wij zijn van mening dat we in samenwerkend verband betere resultaten houden dan door taken op te splitsen.<text:s/><text:line-break/><text:line-break/><text:span text:style-name="T36">Projectinrichting</text:span><text:line-break/><text:line-break/>Voor de Hardware gebruiken wij onze eigen laptops.<text:line-break/>We gebruiken Eclipse met Java als taal als programmeer ongeving.<text:s/><text:line-break/>We gaan voor Git(hub) om onze code en documenten te delen, echter houden Google Drive als back up optie. <text:s/>https://github.com/resoftware-intern/MasterMind<text:line-break/><text:soft-page-break/><text:span text:style-name="T37"><text:line-break/></text:span><text:span text:style-name="T38">Planning</text:span><text:line-break/><text:line-break/>Wie doet wat wanneer? <text:line-break/>Het gaat hier om een verdeling van de werkzaamheden over de teamleden en de beschikbare tijd. <text:line-break/>Geef in het geval van Scrum aan hoeveel sprints er zijn en wat per sprint het einddoel is. </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Standaardalinea-lettertype">
      <style:text-properties style:font-name-asian="Times New Roman" fo:language="en" fo:country="US"/>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Kopvaninhoudsopgave" style:display-name="Kop van inhoudsopgave" style:family="paragraph" style:parent-style-name="Kop1" style:next-style-name="Standaard" style:default-outline-level="1">
      <style:text-properties fo:language="en" fo:country="US" fo:hyphenate="false"/>
    </style:style>
    <style:style style:name="Zwaar" style:display-name="Zwaar" style:family="text" style:parent-style-name="Standaardalinea-lettertype">
      <style:text-properties fo:font-weight="bold" style:font-weight-asian="bold" style:font-weight-complex="bold"/>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ster Mind</dc:title>
    <dc:description/>
    <dc:subject>Project 4</dc:subject>
    <meta:initial-creator>Robin Berkel</meta:initial-creator>
    <dc:creator>Danique Loman</dc:creator>
    <meta:creation-date>2018-05-18T08:35:00Z</meta:creation-date>
    <dc:date>2018-05-18T10:57:00Z</dc:date>
    <meta:template xlink:href="Normal.dotm" xlink:type="simple"/>
    <meta:editing-cycles>2</meta:editing-cycles>
    <meta:editing-duration>PT4560S</meta:editing-duration>
    <meta:document-statistic meta:page-count="4" meta:paragraph-count="4" meta:word-count="329" meta:character-count="2135" meta:row-count="15" meta:non-whitespace-character-count="1810"/>
  </office:meta>
</office:document-meta>
</file>